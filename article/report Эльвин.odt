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 fo:orphans="0" fo:widows="0" fo:text-indent="-0.2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top="0cm" fo:margin-bottom="0.353cm" style:contextual-spacing="false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 style:master-page-name="Converted1">
      <style:paragraph-properties fo:text-align="center" style:justify-single-word="false" style:page-number="auto"/>
      <style:text-properties style:font-name="Times New Roman" fo:font-size="14pt" fo:font-weight="bold" style:font-name-asian="Times New Roman1" style:font-size-asian="14pt" style:font-weight-asian="bold" style:font-size-complex="14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name-asian="Times New Roman1" style:font-size-asian="14pt" style:font-size-complex="14pt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 fo:break-before="page"/>
      <style:text-properties style:font-name="Times New Roman" fo:font-size="14pt" fo:font-weight="bold" style:font-name-asian="Times New Roman1" style:font-size-asian="14pt" style:font-weight-asian="bold" style:font-size-complex="14pt"/>
    </style:style>
    <style:style style:name="P11" style:family="paragraph" style:parent-style-name="Text_20_body">
      <style:paragraph-properties fo:margin-top="0cm" fo:margin-bottom="0cm" style:contextual-spacing="false" fo:line-height="150%"/>
      <style:text-properties style:font-name="Times New Roman" fo:font-size="14pt" fo:font-weight="bold" style:font-size-asian="14pt" style:font-size-complex="14pt"/>
    </style:style>
    <style:style style:name="P12" style:family="paragraph" style:parent-style-name="Text_20_body">
      <style:paragraph-properties fo:line-height="150%"/>
      <style:text-properties style:font-name="Times New Roman" style:font-size-complex="14pt"/>
    </style:style>
    <style:style style:name="P13" style:family="paragraph" style:parent-style-name="Text_20_body" style:list-style-name="L1">
      <style:paragraph-properties fo:line-height="150%"/>
      <style:text-properties style:font-name="Times New Roman" style:font-size-complex="14pt"/>
    </style:style>
    <style:style style:name="P14" style:family="paragraph" style:parent-style-name="Text_20_body" style:list-style-name="L2">
      <style:paragraph-properties fo:line-height="150%"/>
      <style:text-properties style:font-name="Times New Roman" style:font-size-complex="14pt"/>
    </style:style>
    <style:style style:name="P15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style:font-size-asian="14pt" style:font-size-complex="14pt"/>
    </style:style>
    <style:style style:name="P16" style:family="paragraph" style:parent-style-name="Heading_20_1" style:master-page-name="Converted2">
      <style:paragraph-properties fo:margin-top="0cm" fo:margin-bottom="0cm" style:contextual-spacing="false" fo:line-height="150%" style:page-number="auto"/>
      <style:text-properties style:font-name="Times New Roman" fo:font-size="14pt" style:font-name-asian="Times New Roman1" style:font-size-asian="14pt" style:font-size-complex="14pt"/>
    </style:style>
    <style:style style:name="P17" style:family="paragraph" style:parent-style-name="Text_20_body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name-asian="Times New Roman1" style:font-size-asian="14pt" style:font-size-complex="14pt"/>
    </style:style>
    <style:style style:name="P18" style:family="paragraph" style:parent-style-name="Text_20_body">
      <style:paragraph-properties fo:line-height="150%" fo:text-align="justify" style:justify-single-word="false" loext:word-spacing-minimum="75%" loext:word-spacing-maximum="133%"/>
      <style:text-properties style:font-name="Times New Roman" fo:font-size="14pt" style:font-name-asian="Times New Roman1" style:font-size-asian="14pt" style:font-size-complex="14pt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size-asian="14pt" style:font-size-complex="14pt"/>
    </style:style>
    <style:style style:name="P20" style:family="paragraph" style:parent-style-name="Heading_20_1">
      <style:paragraph-properties fo:margin-top="0cm" fo:margin-bottom="0cm" style:contextual-spacing="false" fo:line-height="150%" fo:text-indent="1.251cm" style:auto-text-indent="false" fo:break-before="page"/>
      <style:text-properties style:font-name="Times New Roman" fo:font-size="14pt" style:font-size-asian="14pt" style:font-size-complex="14pt"/>
    </style:style>
    <style:style style:name="P21" style:family="paragraph" style:parent-style-name="Text_20_body">
      <style:paragraph-properties fo:margin-top="0cm" fo:margin-bottom="0cm" style:contextual-spacing="false" fo:line-height="150%" fo:text-align="left" style:justify-single-word="false" fo:text-indent="1.251cm" style:auto-text-indent="false"/>
      <style:text-properties style:font-name="Times New Roman" fo:font-size="14pt" officeooo:rsid="0010e2c7" style:font-name-asian="Times New Roman1" style:font-size-asian="14pt" style:font-size-complex="14pt"/>
    </style:style>
    <style:style style:name="P22" style:family="paragraph" style:parent-style-name="Text_20_body">
      <style:paragraph-properties fo:line-height="150%"/>
      <style:text-properties style:font-name="Times New Roman" fo:font-size="14pt" officeooo:rsid="0010e2c7" style:font-name-asian="Times New Roman1" style:font-size-asian="14pt" style:font-size-complex="14pt"/>
    </style:style>
    <style:style style:name="P23" style:family="paragraph" style:parent-style-name="Text_20_body" style:list-style-name="L3">
      <style:paragraph-properties fo:line-height="150%"/>
      <style:text-properties style:font-name="Times New Roman" fo:font-size="14pt" officeooo:rsid="0010e2c7" style:font-name-asian="Times New Roman1" style:font-size-asian="14pt" style:font-size-complex="14pt"/>
    </style:style>
    <style:style style:name="P24" style:family="paragraph" style:parent-style-name="Text_20_body" style:list-style-name="L3">
      <style:paragraph-properties fo:line-height="150%"/>
      <style:text-properties officeooo:rsid="0010e2c7" style:font-name-asian="Times New Roman1" style:font-size-complex="14pt"/>
    </style:style>
    <style:style style:name="P25" style:family="paragraph" style:parent-style-name="Text_20_body">
      <style:paragraph-properties fo:line-height="150%"/>
      <style:text-properties officeooo:rsid="0010e2c7" style:font-name-asian="Times New Roman1" style:font-size-complex="14pt"/>
    </style:style>
    <style:style style:name="P26" style:family="paragraph" style:parent-style-name="Text_20_body" style:list-style-name="L4">
      <style:paragraph-properties fo:line-height="150%"/>
      <style:text-properties style:font-name="Times New Roman" fo:font-size="14pt" officeooo:rsid="0010e2c7" style:font-name-asian="Times New Roman1" style:font-size-asian="14pt" style:font-size-complex="14pt"/>
    </style:style>
    <style:style style:name="P27" style:family="paragraph" style:parent-style-name="Text_20_body" style:list-style-name="L4">
      <style:paragraph-properties fo:line-height="150%"/>
      <style:text-properties officeooo:rsid="0010e2c7" style:font-name-asian="Times New Roman1" style:font-size-complex="14pt"/>
    </style:style>
    <style:style style:name="P28" style:family="paragraph" style:parent-style-name="Text_20_body" style:list-style-name="L4">
      <style:paragraph-properties fo:line-height="150%"/>
      <style:text-properties officeooo:paragraph-rsid="0012a416"/>
    </style:style>
    <style:style style:name="P29" style:family="paragraph" style:parent-style-name="Heading_20_3">
      <style:paragraph-properties fo:line-height="150%" fo:text-align="justify" style:justify-single-word="false" loext:word-spacing-minimum="75%" loext:word-spacing-maximum="133%"/>
      <style:text-properties style:font-name="Times New Roman" fo:font-size="14pt" officeooo:rsid="0010e2c7" officeooo:paragraph-rsid="0010e2c7" style:font-name-asian="Times New Roman1" style:font-size-asian="14pt" style:font-size-complex="14pt"/>
    </style:style>
    <style:style style:name="P30" style:family="paragraph" style:parent-style-name="Text_20_body">
      <style:paragraph-properties fo:line-height="150%" fo:text-align="justify" style:justify-single-word="false" loext:word-spacing-minimum="75%" loext:word-spacing-maximum="133%"/>
      <style:text-properties style:font-name="Times New Roman" fo:font-size="14pt" officeooo:rsid="0010e2c7" style:font-name-asian="Times New Roman1" style:font-size-asian="14pt" style:font-size-complex="14pt"/>
    </style:style>
    <style:style style:name="P31" style:family="paragraph" style:parent-style-name="Text_20_body" style:list-style-name="L5">
      <style:paragraph-properties fo:line-height="150%" fo:text-align="justify" style:justify-single-word="false" loext:word-spacing-minimum="75%" loext:word-spacing-maximum="133%"/>
      <style:text-properties style:font-name="Times New Roman" fo:font-size="14pt" officeooo:rsid="0010e2c7" style:font-name-asian="Times New Roman1" style:font-size-asian="14pt" style:font-size-complex="14pt"/>
    </style:style>
    <style:style style:name="P32" style:family="paragraph" style:parent-style-name="Text_20_body" style:list-style-name="L5">
      <style:paragraph-properties fo:line-height="150%" fo:text-align="justify" style:justify-single-word="false" loext:word-spacing-minimum="75%" loext:word-spacing-maximum="133%"/>
      <style:text-properties style:font-name="Times New Roman" fo:font-size="14pt" officeooo:rsid="0010e2c7" officeooo:paragraph-rsid="00155ab6" style:font-name-asian="Times New Roman1" style:font-size-asian="14pt" style:font-size-complex="14pt"/>
    </style:style>
    <style:style style:name="P33" style:family="paragraph" style:parent-style-name="Text_20_body">
      <style:paragraph-properties fo:line-height="150%" fo:text-align="justify" style:justify-single-word="false" loext:word-spacing-minimum="75%" loext:word-spacing-maximum="133%"/>
      <style:text-properties style:font-name="Times New Roman" fo:font-size="14pt" officeooo:rsid="0010e2c7" officeooo:paragraph-rsid="0010e2c7" style:font-name-asian="Times New Roman1" style:font-size-asian="14pt" style:font-size-complex="14pt"/>
    </style:style>
    <style:style style:name="P34" style:family="paragraph" style:parent-style-name="Standard">
      <style:paragraph-properties fo:margin-top="0cm" fo:margin-bottom="0cm" style:contextual-spacing="false" fo:line-height="150%" fo:text-align="left" style:justify-single-word="false" fo:text-indent="1.251cm" style:auto-text-indent="false"/>
      <style:text-properties style:font-name="Times New Roman" fo:font-size="14pt" fo:font-weight="bold" style:font-name-asian="Times New Roman1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margin-top="0cm" fo:margin-bottom="0.353cm" style:contextual-spacing="false"/>
      <style:text-properties style:font-name="Times New Roman" fo:font-size="14pt" fo:font-weight="bold" officeooo:paragraph-rsid="0012a416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margin-top="0cm" fo:margin-bottom="0.353cm" style:contextual-spacing="false"/>
      <style:text-properties style:font-name="Times New Roman" fo:font-size="14pt" fo:font-weight="normal" officeooo:paragraph-rsid="0012a416" style:font-size-asian="14pt" style:font-weight-asian="normal" style:font-size-complex="14pt" style:font-weight-complex="normal"/>
    </style:style>
    <style:style style:name="P37" style:family="paragraph" style:parent-style-name="Text_20_body">
      <style:paragraph-properties fo:margin-top="0cm" fo:margin-bottom="0.353cm" style:contextual-spacing="false"/>
      <style:text-properties style:font-name="Times New Roman" fo:font-size="14pt" style:font-size-asian="14pt" style:font-size-complex="14pt"/>
    </style:style>
    <style:style style:name="P38" style:family="paragraph" style:parent-style-name="Text_20_body" style:list-style-name="L6">
      <style:paragraph-properties fo:margin-top="0cm" fo:margin-bottom="0.353cm" style:contextual-spacing="false"/>
      <style:text-properties style:font-name="Times New Roman" fo:font-size="14pt" style:font-size-asian="14pt" style:font-size-complex="14pt"/>
    </style:style>
    <style:style style:name="P39" style:family="paragraph" style:parent-style-name="Text_20_body">
      <style:paragraph-properties fo:margin-top="0cm" fo:margin-bottom="0.353cm" style:contextual-spacing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margin-top="0cm" fo:margin-bottom="0.353cm" style:contextual-spacing="false"/>
      <style:text-properties style:font-name="Times New Roman" style:font-size-complex="14pt"/>
    </style:style>
    <style:style style:name="P41" style:family="paragraph" style:parent-style-name="Heading_20_3">
      <style:paragraph-properties fo:margin-top="0cm" fo:margin-bottom="0.353cm" style:contextual-spacing="false"/>
      <style:text-properties style:font-name="Times New Roman" fo:font-size="14pt" style:font-size-asian="14pt" style:font-size-complex="14pt"/>
    </style:style>
    <style:style style:name="P42" style:family="paragraph" style:parent-style-name="Text_20_body" style:list-style-name="L7">
      <style:paragraph-properties fo:margin-top="0cm" fo:margin-bottom="0.353cm" style:contextual-spacing="false"/>
      <style:text-properties style:font-name="Times New Roman" style:font-size-complex="14pt"/>
    </style:style>
    <style:style style:name="T1" style:family="text">
      <style:text-properties fo:font-weight="bold"/>
    </style:style>
    <style:style style:name="T2" style:family="text">
      <style:text-properties fo:font-weight="bold" officeooo:rsid="0013d2ac"/>
    </style:style>
    <style:style style:name="T3" style:family="text">
      <style:text-properties fo:font-style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-asian="Times New Roman1"/>
    </style:style>
    <style:style style:name="T6" style:family="text">
      <style:text-properties fo:text-transform="uppercase" style:font-name-asian="Times New Roman1"/>
    </style:style>
    <style:style style:name="T7" style:family="text">
      <style:text-properties style:font-name="Times New Roman" fo:font-size="14pt" fo:font-weight="bold" style:font-size-asian="14pt"/>
    </style:style>
    <style:style style:name="T8" style:family="text">
      <style:text-properties style:font-name="Times New Roman" fo:font-size="14pt" style:font-size-asian="14pt"/>
    </style:style>
    <style:style style:name="T9" style:family="text">
      <style:text-properties style:font-name="Times New Roman" fo:font-size="14pt" officeooo:rsid="0010e2c7" style:font-name-asian="Times New Roman1" style:font-size-asian="14pt" style:font-size-complex="14pt"/>
    </style:style>
    <style:style style:name="T10" style:family="text">
      <style:text-properties officeooo:rsid="00155ab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Hlk216651477"/>Министерство науки и высшего образования РФ</text:p>
      <text:p text:style-name="P1">Федеральное государственное автономное </text:p>
      <text:p text:style-name="P1">образовательное учреждение высшего образования</text:p>
      <text:p text:style-name="P2">«СИБИРСКИЙ ФЕДЕРАЛЬНЫЙ УНИВЕРСИТЕТ»</text:p>
      <text:p text:style-name="P3"/>
      <text:p text:style-name="P4">Гуманитарный институт</text:p>
      <text:p text:style-name="P4">Кафедра информационных технологий</text:p>
      <text:p text:style-name="P4">в креативных и культурных индустриях</text:p>
      <text:p text:style-name="P5"/>
      <text:p text:style-name="P5"/>
      <text:p text:style-name="P5"/>
      <text:p text:style-name="P5"/>
      <text:p text:style-name="P5"/>
      <text:p text:style-name="P2">ОТЧЕТ О ТЕХНОЛОГИЧЕСКОЙ </text:p>
      <text:p text:style-name="P2">(ПРОЕКТНО-ТЕХНОЛОГИЧЕСКОЙ) ПРАКТИКЕ</text:p>
      <text:p text:style-name="P4"/>
      <text:p text:style-name="P6">Формирование корпуса отчетов губернаторов Енисейской губернии: опыт автоматизации разметки текстов с использованием ИИ-инструментов<text:bookmark-end text:name="_Hlk216651477"/></text:p>
      <text:p text:style-name="P7">РЕФЕРАТ</text:p>
      <text:p text:style-name="P8"/>
      <text:p text:style-name="P9">Отчет о технологической (проектно-технологической) практике по теме «Формирование корпуса отчетов губернаторов Енисейской губернии: опыт автоматизации разметки текстов с использованием ИИ-инструментов» содержит сведения о разработке и апробации автоматизированного пайплайна обработки исторических документов. Работа выполнена на материале отчетов гражданских губернаторов и генерал-губернаторов Енисейской губернии XIX - начала XX века, представленных на портале GovReport Сибирского федерального университета.</text:p>
      <text:p text:style-name="P9">Ключевые слова: TEI XML, цифровая гуманитаристика, исторический корпус, Енисейская губерния, губернаторские отчеты, OCR, автоматизированная разметка, корпусная разметка, хронологические маркеры, исторические события, верификация данных, реестр сущностей, CSV, XML.</text:p>
      <text:p text:style-name="P9">Индивидуальное задание на период практики заключалось в участии в научно-исследовательской работе по теме «Формирование корпуса отчетов губернаторов Енисейской губернии: опыт автоматизации разметки текстов с использованием ИИ-инструментов». В рамках выполнения задания необходимо было провести экспертную верификацию результатов первичной автоматической разметки текстового массива, выявить пропущенные или некорректно определенные хронологические маркеры, осуществить их контекстуальное связывание с уникальными идентификаторами исторических событий, а также сформировать структурированные контрольные списки извлеченных именованных сущностей (персон и топонимов) для их последующей нормализации. Итогом работы является подготовка валидированного текстового фрагмента и аналитических реестров сущностей в формате CSV.</text:p>
      <text:p text:style-name="P9"><text:tab/>Цель работы - апробировать элементы автоматизированного пайплайна обработки исторических документов на этапе верификации и контроля качества данных, выполнив ручную коррекцию хронологических <text:soft-page-break/>маркеров в формате TEI XML со связыванием их с реестром событий, а также систематизировать извлеченные из текста именованные сущности в виде структурированных контрольных таблиц.<text:tab/></text:p>
      <text:p text:style-name="P9">Для достижения цели были поставлены следующие задачи:<text:tab/></text:p>
      <text:p text:style-name="P9">- проанализировать структуру автоматической разметки временных показателей и требования к кодированию дат в формате TEI XML; </text:p>
      <text:p text:style-name="P9">- осуществить экспертную верификацию и ручную доразметку пропущенных или некорректно определенных автоматическим парсером дат в текстовом массиве всеподданнейшего отчета за 1851 год со связыванием их с историческими событиями через атрибут ref;</text:p>
      <text:p text:style-name="P9">- провести очистку тегов от избыточных технических атрибутов автоматического скрипта-разметчика для обеспечения чистоты результирующего XML-кода;</text:p>
      <text:p text:style-name="P9">- извлечь, верифицировать и нормализовать (привести к именительному падежу) упоминания антропонимов и топонимов, встреченных в тексте, распределив их по ролям, должностям и административному статусу в структурированных таблицах.</text:p>
      <text:p text:style-name="P9"><text:tab/>В результате практики были успешно апробированы элементы технологического пайплайна на этапе контроля качества и экспертной валидации данных. Выполнена сплошная проверка хронологической разметки в XML, а также проведена аналитическая работа по выгрузке и нормализации именованных сущностей. </text:p>
      <text:p text:style-name="P9"><text:tab/>Итогом практической деятельности стали следующие результаты:</text:p>
      <text:p text:style-name="P9">1. Финально верифицированный и очищенный образец исторического документа 1851_final_marked.xml со сквозной семантической привязкой дат к реестру исторических событий губернии.</text:p>
      <text:p text:style-name="P9">2. Контрольный реестр топонимов и географических объектов "Города ТС.csv", содержащий сопоставление контекстного написания со стандартной формой в именительном падеже и указанием административного статуса или типа объекта.</text:p>
      <text:p text:style-name="P9"><text:soft-page-break/>3. Контрольный реестр антропонимов "Имена ТС.csv", включающий нормализованные имена исторических персоналий с фиксированием их социальной роли, должности или сословной принадлежности.</text:p>
      <text:p text:style-name="P9"><text:tab/>Практическая значимость результата состоит в том, что отработанная методика ручной валидации хронологии и формирования структурированных CSV-реестров позволяет существенно повысить точность работы ИИ-инструментов на этапе извлечения фактографических данных при масштабировании корпуса.</text:p>
      <text:p text:style-name="P9"/>
      <text:p text:style-name="P5"/>
      <text:p text:style-name="P10">СОДЕРЖАНИЕ</text:p>
      <text:p text:style-name="P8"/>
      <text:p text:style-name="P11">СОДЕРЖАНИЕ</text:p>
      <text:p text:style-name="P12"><text:span text:style-name="T1">ВВЕДЕНИЕ</text:span> ........................................................................................................ <text:span text:style-name="T2">6</text:span></text:p>
      <text:p text:style-name="P12"><text:span text:style-name="T1">1 МЕТОДИКА ЭКСПЕРТНОЙ ВЕРИФИКАЦИИ И РУЧНОЙ</text:span> <text:span text:style-name="T1">ДОРАЗМЕТКИ ТЕКСТА</text:span> ................................................................................ <text:span text:style-name="T2">8</text:span></text:p>
      <text:list text:style-name="L1">
        <text:list-item>
          <text:p text:style-name="P13">1.1 Анализ качества первичной автоматической разметки ....................... <text:span text:style-name="T2">8</text:span></text:p>
        </text:list-item>
        <text:list-item>
          <text:p text:style-name="P13">1.2 Процесс ручной корректировки TEI XML-кода ................................... <text:span text:style-name="T2">8</text:span></text:p>
        </text:list-item>
        <text:list-item>
          <text:p text:style-name="P13">1.3 Систематизация сущностей в таблицах CSV .......................................... <text:span text:style-name="T2">9</text:span></text:p>
        </text:list-item>
      </text:list>
      <text:p text:style-name="P12"><text:span text:style-name="T1">2 РЕФЛЕКСИЯ И АНАЛИЗ ПОЛУЧЕННЫХ НАВЫКОВ</text:span> ......................... <text:span text:style-name="T2">10</text:span></text:p>
      <text:list text:style-name="L2">
        <text:list-item>
          <text:p text:style-name="P14">2.1 Суть проекта и личный вклад ............................................................. <text:span text:style-name="T2">10</text:span></text:p>
        </text:list-item>
      </text:list>
      <text:p text:style-name="P12"><text:span text:style-name="T1">ЗАКЛЮЧЕНИЕ</text:span> .................................................................................................... <text:span text:style-name="T2">11</text:span></text:p>
      <text:p text:style-name="P15"/>
      <text:h text:style-name="P16" text:outline-level="1"><text:bookmark-start text:name="_Toc230302522"/>ВВЕДЕНИЕ<text:bookmark-end text:name="_Toc230302522"/></text:h>
      <text:p text:style-name="P8"/>
      <text:p text:style-name="P17">В современной цифровой гуманитаристике (<text:span text:style-name="T3">Digital Humanities</text:span>) переход от простых цифровых копий исторических источников (сканов или OCR-текстов) к полноценным исследовательским corps требует применения стандартизированной разметки. Международный стандарт TEI XML позволяет преобразовывать тексты в машиночитаемый вид, детально описывая как структуру документа, так и семантические элементы: имена, географические объекты, организации и даты [1]. Это создает основу для автоматизированного поиска и количественного анализа данных.</text:p>
      <text:p text:style-name="P18"><text:span text:style-name="T4">Проблема исследования.</text:span> Корпус отчетов губернаторов Енисейской губернии XIX века обладает высокой исторической ценностью, однако его автоматическая обработка ИИ-инструментами затруднена. Дореформенная орфография, сложные административные формулы и специфическая лексика приводят к ошибкам алгоритмов распознавания сущностей (NER) и некорректной привязке хронологических маркеров. В связи с этим возникает необходимость гибридного подхода, при котором первичная автоматическая разметка ИИ проходит обязательный этап экспертного контроля качества, ручной доработки человеком и выгрузки сущностей в чистые аналитические таблицы.</text:p>
      <text:p text:style-name="P18"><text:span text:style-name="T4">Цель работы</text:span> - провести верификацию результатов автоматизированного пайплайна разметки исторических документов на материале отчета губернатора Енисейской губернии за 1851 год, осуществить ручную доразметку и очистку временных маркеров в формате TEI XML со связыванием их с реестром событий, а также сформировать нормализованные контрольные реестры извлеченных именованных сущностей в формате CSV.</text:p>
      <text:p text:style-name="P17"/>
      <text:p text:style-name="P9">Для достижения цели были поставлены следующие задачи:</text:p>
      <text:p text:style-name="P9">- Изучить принципы структурной и семантической разметки исторических источников в стандарте TEI XML;</text:p>
      <text:p text:style-name="P19"><text:soft-page-break/><text:span text:style-name="T5">-</text:span>Осуществить сплошную проверку качества автоматической разметки именованных сущностей в тексте отчета за 1851 год и вручную устранить пропуски и ошибки алгоритмов; </text:p>
      <text:p text:style-name="P19"><text:span text:style-name="T5">- </text:span>Систематизировать верифицированные сущности (персоны, топонимы, организации) в виде структурированного реестра в формате CSV; </text:p>
      <text:p text:style-name="P17"><text:span text:style-name="T4">Объектом исследования</text:span> является текст отчета губернатора Енисейской губернии за 1851 год, а<text:span text:style-name="T4"> предметом</text:span> - методика экспертной валидации и ручной доразметки ИИ-структурированных текстовых массивов.</text:p>
      <text:p text:style-name="P18"><text:span text:style-name="T4">Методологическую и технологическую основу</text:span> работы составили методы источниковедческого анализа, принципы корпусной лингвистики, международный стандарт разметки TEI P5, язык XML, а также формат CSV для упорядочивания табличных данных.</text:p>
      <text:p text:style-name="P18"><text:span text:style-name="T4">Гипотеза работы</text:span> заключается в том, что экспертный контроль и ручная доразметка ИИ-текстов позволяют полностью компенсировать ошибки автоматического анализа исторических документов, существенно повышая точность финального цифрового корпуса и подготавливая надежную базу для историко-гуманитарной аналитики.</text:p>
      <text:p text:style-name="P9"/>
      <text:p text:style-name="P5"/>
      <text:h text:style-name="P20" text:outline-level="1"><text:bookmark-start text:name="_Toc230302523"/><text:span text:style-name="T6">1 </text:span><text:bookmark-end text:name="_Toc230302523"/>МЕТОДИКА ЭКСПЕРТНОЙ ВЕРИФИКАЦИИ И РУЧНОЙ ДОРАЗМЕТКИ ТЕКСТА</text:h>
      <text:p text:style-name="P8"/>
      <text:p text:style-name="P21"><text:span text:style-name="T1">1.1 Анализ качества первичной автоматической разметки</text:span> На данном этапе исследования был взят текстовый массив всеподданнейшего отчета губернатора Енисейской губернии за 1851 год, прошедший первичную обработку автоматизированным ИИ-пайплайном. Целью анализа было проведение экспертного контроля качества для проверки полноты извлечения фактографических данных (персон, топонимов, организаций) и выявления возможных пропусков алгоритмов при разметке хронологических показателей.</text:p>
      <text:p text:style-name="P22">В ходе сплошной верификации текста было установлено... Основные задачи верификации свелись к:</text:p>
      <text:list text:style-name="L3">
        <text:list-item>
          <text:p text:style-name="P23"><text:span text:style-name="T1">Поиск пропущенных хронологических маркеров:</text:span> Выявление единичных случаев, когда цифры годов или контекстные указания на время не были обернуты автоматическим скриптом в соответствующие теги.</text:p>
        </text:list-item>
        <text:list-item>
          <text:p text:style-name="P24"><text:span text:style-name="T7">Проверка контекстных связей (ref-ссылок):</text:span><text:span text:style-name="T8"> Контроль правильности соотнесения дат с конкретными историческими процессами и событиями, описанными в тексте отчета. Это осуществлялось путем проверки и ручного добавления атрибута </text:span><text:span text:style-name="Source_20_Text"><text:span text:style-name="T8">ref</text:span></text:span><text:span text:style-name="T8"> в теги дат для исключения логических сдвигов в базе данных.</text:span></text:p>
        </text:list-item>
      </text:list>
      <text:p text:style-name="P25"><text:span text:style-name="T7">1.2 Процесс ручной корректировки TEI XML-кода</text:span><text:span text:style-name="T8"> Для исправления ошибок была проведена сплошная ручная доразметка документа </text:span><text:span text:style-name="Source_20_Text"><text:span text:style-name="T8">1851_final_marked.xml</text:span></text:span><text:span text:style-name="T8"> в соответствии со стандартами консорциума TEI (Text Encoding Initiative). Работа строилась по следующему алгоритму:</text:span></text:p>
      <text:list text:style-name="L4">
        <text:list-item>
          <text:p text:style-name="P26"><text:span text:style-name="T1">Валидация тегов:</text:span> Восстановление пропущенных или некорректно закрытых тегов структурных элементов документа.</text:p>
        </text:list-item>
        <text:list-item>
          <text:p text:style-name="P26"><text:soft-page-break/><text:span text:style-name="T1">Точечная семантическая разметка:</text:span> Вручную размечались пропущенные сущности с использованием строгого синтаксиса стандарта TEI XML:</text:p>
          <text:list>
            <text:list-item>
              <text:p text:style-name="P27"><text:span text:style-name="T8">Персоны: </text:span><text:span text:style-name="Source_20_Text"><text:span text:style-name="T8">&lt;persName&gt;...&lt;/persName&gt;</text:span></text:span></text:p>
            </text:list-item>
            <text:list-item>
              <text:p text:style-name="P27"><text:span text:style-name="T8">Географические объекты: </text:span><text:span text:style-name="Source_20_Text"><text:span text:style-name="T8">&lt;placeName&gt;...&lt;/placeName&gt;</text:span></text:span></text:p>
            </text:list-item>
            <text:list-item>
              <text:p text:style-name="P27"><text:span text:style-name="T8">Организации и ведомства: </text:span><text:span text:style-name="Source_20_Text"><text:span text:style-name="T8">&lt;orgName&gt;...&lt;/orgName&gt;</text:span></text:span></text:p>
            </text:list-item>
            <text:list-item>
              <text:p text:style-name="P28"><text:span text:style-name="T9">Даты и временные маркеры: </text:span><text:span text:style-name="Source_20_Text"><text:span text:style-name="T8">&lt;date when="..." ref="..."&gt;...&lt;/date&gt; </text:span></text:span></text:p>
            </text:list-item>
          </text:list>
        </text:list-item>
      </text:list>
      <text:p text:style-name="P21"/>
      <text:h text:style-name="P29" text:outline-level="3">1.3 Систематизация сущностей в таблицах CSV</text:h>
      <text:p text:style-name="P30">Помимо работы с XML-кодом, важной частью практики стало упорядочивание встреченных в отчете названий и имен в отдельные файлы. Результатом этой работы стали две таблицы:</text:p>
      <text:list text:style-name="L5">
        <text:list-item>
          <text:p text:style-name="P31"><text:span text:style-name="T4">"Города ТС.csv"</text:span> - реестр из 37 географических объектов (городов, округов, рек). В таблице зафиксировано, как объект написан в самом тексте отчета, указано его стандартное название в именительном падеже, а также определен его тип или административный статус.</text:p>
        </text:list-item>
        <text:list-item>
          <text:p text:style-name="P32"><text:span text:style-name="T4">"Имена ТС.csv"</text:span> - реестр из 140 исторических персон. Для каждого имени проведена нормализация (приведение к именительному падежу) и на основе контекста определена социальная роль, сословие или должность человека (например, купец, мещанин, губернатор).</text:p>
        </text:list-item>
      </text:list>
      <text:p text:style-name="P33"/>
      <text:p text:style-name="P9"/>
      <text:p text:style-name="P8"/>
      <text:p text:style-name="P34">2 РЕФЛЕКСИЯ И АНАЛИЗ ПОЛУЧЕННЫХ НАВЫКОВ </text:p>
      <text:p text:style-name="P35">2.1 Суть проекта и личный вклад </text:p>
      <text:p text:style-name="P36">В ходе прохождения практики я принимал участие в научно-исследовательском проекте Провалинского Владимира и Карповича Александра под руководством <text:soft-page-break/>научного руководителя Нигматуллина Ильи <text:span text:style-name="T10">Рафаильевича</text:span>. Данный проект посвящен созданию цифрового корпуса отчетов губернаторов Енисейской губернии. Его суть заключается в том, чтобы перевести архивные документы (сканы и распознанный текст) в современный машиночитаемый формат TEI XML. Это необходимо для того, чтобы историки могли оперативно искать нужную информацию, визуализировать данные и проводить компьютерный анализ текстов.</text:p>
      <text:p text:style-name="P37">Моя личная работа в проекте строилась на этапе контроля качества автоматической разметки. Я работал с конкретным историческим документом - отчетом Енисейского гражданского губернатора за 1851 год. Моя задача состояла в том, чтобы:</text:p>
      <text:list text:style-name="L6">
        <text:list-item>
          <text:p text:style-name="P38">Проверить XML-код после автоматического скрипта и вручную доразметить пропущенные им элементы.</text:p>
        </text:list-item>
        <text:list-item>
          <text:p text:style-name="P38">Собрать две независимые таблицы - «Города ТС.csv» и «Имена ТС.csv», приведя все названия и имена к стандартному именительному падежу и классифицировав их по типам и социальным ролям.</text:p>
        </text:list-item>
      </text:list>
      <text:p text:style-name="P39"/>
      <text:p text:style-name="P37">В процессе выполнения этой работы я прошёл важный этап адаптации. Изначально, открыв первично размеченный документ, было сложно оперативно считывать структуру TEI XML из-за высокой плотности тегов. Однако по мере погружения в материал у меня сформировалось понимание логики разметки: синтаксис кода стал понятным, и я начал замечать неточности и пропущенные автоматическим скриптом сущности.</text:p>
      <text:p text:style-name="P40">Для меня, как для студента первого курса, участие в верификации реального архивного корпуса стало серьёзным и увлекательным вызовом. Работа с международным стандартом TEI XML дала ощущение причастности к сложным, продвинутым технологиям на стыке истории и IT (Digital Humanities), к которым на начальном этапе обучения редко удаётся прикоснуться. Это не только развило мою внимательность к деталям при работе с кодом, но и подтвердило важность концепции , где человеческий опыт дополняет и корректирует возможности искусственного интеллекта.</text:p>
      <text:h text:style-name="P41" text:outline-level="3">ЗАКЛЮЧЕНИЕ</text:h>
      <text:p text:style-name="P40">В ходе прохождения технологической (проектно-технологической) практики были в полном объёме выполнены поставленные задачи и достигнута главная <text:soft-page-break/>цель - апробация элементов автоматизированного пайплайна обработки исторических документов на этапе экспертной верификации качества данных.</text:p>
      <text:p text:style-name="P40">На основании проделанной работы можно сделать следующие выводы:</text:p>
      <text:list text:style-name="L7">
        <text:list-item>
          <text:p text:style-name="P42">Применение ИИ-инструментов для первичного анализа текстов XIX века значительно ускоряет процесс формирования цифровых корпусов, однако специфика исторических источников обуславливает необходимость обязательного контроля.</text:p>
        </text:list-item>
        <text:list-item>
          <text:p text:style-name="P42">В ходе сплошной ручной верификации всеподданнейшего отчёта губернатора Енисейской губернии за 1851 год были успешно устранены пропуски автоматического парсера.</text:p>
        </text:list-item>
        <text:list-item>
          <text:p text:style-name="P42">Систематизация и нормализация извлечённых сущностей позволили сформировать два чистых структурированных реестра («Города ТС.csv» и «Имена ТС.csv»), содержащих 37 географических объектов и 140 исторических персоналий, приведённых к именительному падежу с указанием их административного и социального статусов.</text:p>
        </text:list-item>
      </text:list>
      <text:p text:style-name="P40">Практический опыт показал, что гибридный подход, совмещающий скорость алгоритмов искусственного интеллекта и экспертный анализ человека, позволяет компенсировать ошибки автоматического распознавания (NER). Это обеспечивает создание достоверной и репрезентативной основы для дальнейших компьютерных и статистических исследований в области цифровой гуманитаристики (Digital Humanities).</text:p>
      <text:p text:style-name="P37"/>
      <text:h text:style-name="P20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Segoe UI" style:font-size-asian="11pt" style:language-asian="ru" style:country-asian="RU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Segoe UI" style:font-size-asian="11pt" style:language-asian="ru" style:country-asian="RU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 style:class="extra">
      <style:paragraph-properties fo:line-height="100%" fo:text-align="center" style:justify-single-word="false"/>
      <style:text-properties fo:font-size="10pt" style:font-size-asian="10pt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text-align="center" style:justify-single-word="false" fo:keep-together="always" fo:keep-with-next="always"/>
      <style:text-properties fo:font-size="16pt" fo:font-weight="bold" style:font-name-asian="Segoe UI" style:font-family-asian="'Segoe UI'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text-align="center" style:justify-single-word="false" fo:keep-together="always" fo:keep-with-next="always"/>
      <style:text-properties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94cm" fo:margin-top="0cm" fo:margin-bottom="0.176cm" style:contextual-spacing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Segoe UI" style:font-family-asian="'Segoe UI'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ne_20_numbering" style:display-name="Line numbering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 style:font-name-asian="Segoe UI" style:font-family-asian="'Segoe UI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="Calibri" fo:font-family="Calibri" style:font-family-generic="roman" style:font-pitch="variable" style:font-name-asian="Segoe UI" style:font-family-asian="'Segoe UI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Calibri" fo:font-family="Calibri" style:font-family-generic="roman" style:font-pitch="variable" style:font-name-asian="Segoe UI" style:font-family-asian="'Segoe UI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Текущий_20_список1" style:display-name="Текущий список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1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space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space"/>
        </style:list-level-properties>
        <style:text-properties fo:font-family="'Times New Roman'" style:font-style-name="Обычный" style:font-family-generic="roman" style:font-pitch="variable"/>
      </text:list-level-style-bullet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space"/>
        </style:list-level-properties>
        <style:text-properties fo:font-family="'Times New Roman'" style:font-style-name="Обычный" style:font-family-generic="roman" style:font-pitch="variable"/>
      </text:list-level-style-bullet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1" style:family="table">
      <style:table-properties style:width="16.859cm" fo:margin-left="0cm" fo:margin-top="0cm" fo:margin-bottom="0cm" table:align="left" style:writing-mode="lr-tb"/>
    </style:style>
    <style:style style:name="Таблица1.A" style:family="table-column">
      <style:table-column-properties style:column-width="3.293cm"/>
    </style:style>
    <style:style style:name="Таблица1.B" style:family="table-column">
      <style:table-column-properties style:column-width="2.692cm"/>
    </style:style>
    <style:style style:name="Таблица1.C" style:family="table-column">
      <style:table-column-properties style:column-width="3.388cm"/>
    </style:style>
    <style:style style:name="Таблица1.D" style:family="table-column">
      <style:table-column-properties style:column-width="2.628cm"/>
    </style:style>
    <style:style style:name="Таблица1.E" style:family="table-column">
      <style:table-column-properties style:column-width="4.85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3" style:family="table-row">
      <style:table-row-properties style:min-row-height="0.432cm" fo:keep-together="auto"/>
    </style:style>
    <style:style style:name="Таблица1.4" style:family="table-row">
      <style:table-row-properties style:min-row-height="0.194cm" fo:keep-together="auto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text-align="left" style:justify-single-word="false" fo:orphans="0" fo:widows="0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language="ru" fo:country="RU" style:letter-kerning="false" style:font-name-asian="Times New Roman1" style:language-asian="en" style:country-asian="US" style:font-name-complex="Times New Roman1" style:font-size-complex="10pt" style:language-complex="ar" style:country-complex="SA"/>
    </style:style>
    <style:style style:name="MP4" style:family="paragraph" style:parent-style-name="Standard">
      <style:paragraph-properties fo:margin-top="0cm" fo:margin-bottom="0cm" style:contextual-spacing="false" fo:line-height="100%" fo:text-align="left" style:justify-single-word="false" fo:orphans="0" fo:widows="0">
        <style:tab-stops>
          <style:tab-stop style:position="1.242cm"/>
        </style:tab-stops>
      </style:paragraph-properties>
      <style:text-properties fo:language="ru" fo:country="RU" style:letter-kerning="false" style:font-name-asian="Times New Roman1" style:language-asian="ru" style:country-asian="RU" style:font-name-complex="Times New Roman1" style:font-size-complex="10pt" style:language-complex="ar" style:country-complex="SA"/>
    </style:style>
    <style:style style:name="MP5" style:family="paragraph" style:parent-style-name="Standard">
      <style:paragraph-properties fo:margin-top="0cm" fo:margin-bottom="0cm" style:contextual-spacing="false" fo:line-height="100%" fo:text-align="left" style:justify-single-word="false" fo:orphans="0" fo:widows="0">
        <style:tab-stops>
          <style:tab-stop style:position="1.242cm"/>
        </style:tab-stops>
      </style:paragraph-properties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MP6" style:family="paragraph" style:parent-style-name="Standard">
      <style:paragraph-properties fo:margin-top="0cm" fo:margin-bottom="0cm" style:contextual-spacing="false" fo:line-height="100%" fo:text-align="left" style:justify-single-word="false" fo:orphans="0" fo:widows="0">
        <style:tab-stops>
          <style:tab-stop style:position="1.242cm"/>
        </style:tab-stops>
      </style:paragraph-properties>
      <style:text-properties fo:language="ru" fo:country="RU" style:letter-kerning="false" style:font-name-asian="Times New Roman1" style:language-asian="ru" style:country-asian="RU" style:font-name-complex="Times New Roman1" style:font-size-complex="14pt" style:language-complex="ar" style:country-complex="SA"/>
    </style:style>
    <style:style style:name="MP7" style:family="paragraph" style:parent-style-name="Standard">
      <style:paragraph-properties fo:margin-top="0cm" fo:margin-bottom="0cm" style:contextual-spacing="false" fo:line-height="100%" fo:text-align="left" style:justify-single-word="false" fo:orphans="0" fo:widows="0">
        <style:tab-stops>
          <style:tab-stop style:position="1.242cm"/>
        </style:tab-stops>
      </style:paragraph-properties>
      <style:text-properties fo:language="ru" fo:country="RU" style:text-underline-style="solid" style:text-underline-width="auto" style:text-underline-color="font-color" style:letter-kerning="false" style:font-name-asian="Times New Roman1" style:language-asian="ru" style:country-asian="RU" style:font-name-complex="Times New Roman1" style:font-size-complex="14pt" style:language-complex="ar" style:country-complex="SA"/>
    </style:style>
    <style:style style:name="MP8" style:family="paragraph" style:parent-style-name="Standard">
      <style:paragraph-properties fo:margin-top="0cm" fo:margin-bottom="0cm" style:contextual-spacing="false" fo:line-height="100%" fo:text-align="left" style:justify-single-word="false" fo:orphans="0" fo:widows="0" fo:text-indent="0.06cm" style:auto-text-indent="false">
        <style:tab-stops>
          <style:tab-stop style:position="1.242cm"/>
        </style:tab-stops>
      </style:paragraph-properties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M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>
        <style:tab-stops>
          <style:tab-stop style:position="1.242cm"/>
        </style:tab-stops>
      </style:paragraph-properties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MP10" style:family="paragraph" style:parent-style-name="Standard">
      <style:paragraph-properties fo:margin-top="0cm" fo:margin-bottom="0cm" style:contextual-spacing="false" fo:line-height="100%" fo:text-align="left" style:justify-single-word="false" fo:orphans="0" fo:widows="0">
        <style:tab-stops>
          <style:tab-stop style:position="1.242cm"/>
        </style:tab-stops>
      </style:paragraph-properties>
      <style:text-properties fo:language="ru" fo:country="RU" officeooo:rsid="000baf8a" officeooo:paragraph-rsid="000baf8a" style:letter-kerning="false" style:font-name-asian="Calibri1" style:language-asian="en" style:country-asian="US" style:font-size-complex="11pt" style:language-complex="ar" style:country-complex="SA"/>
    </style:style>
    <style:style style:name="M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>
        <style:tab-stops>
          <style:tab-stop style:position="1.242cm"/>
        </style:tab-stops>
      </style:paragraph-properties>
      <style:text-properties fo:language="ru" fo:country="RU" style:letter-kerning="false" style:font-name-asian="Times New Roman1" style:language-asian="ru" style:country-asian="RU" style:font-name-complex="Times New Roman1" style:font-size-complex="10pt" style:language-complex="ar" style:country-complex="SA"/>
    </style:style>
    <style:style style:name="M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text-indent="0.009cm" style:auto-text-indent="false">
        <style:tab-stops>
          <style:tab-stop style:position="1.242cm"/>
        </style:tab-stops>
      </style:paragraph-properties>
      <style:text-properties fo:language="ru" fo:country="RU" style:letter-kerning="false" style:font-name-asian="Times New Roman1" style:language-asian="ru" style:country-asian="RU" style:font-name-complex="Times New Roman1" style:font-size-complex="10pt" style:language-complex="ar" style:country-complex="SA"/>
    </style:style>
    <style:style style:name="M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-asian="Times New Roman1" style:font-name-complex="Times New Roman1" style:font-size-complex="14pt"/>
    </style:style>
    <style:style style:name="MP14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MT1" style:family="text">
      <style:text-properties style:font-name-asian="Times New Roman1" style:language-asian="ru" style:country-asian="RU" style:font-name-complex="Times New Roman1" style:font-size-complex="10pt"/>
    </style:style>
    <style:style style:name="MT2" style:family="text">
      <style:text-properties style:font-name-asian="Times New Roman1" style:language-asian="ru" style:country-asian="RU" style:font-name-complex="Times New Roman1" style:font-size-complex="14pt"/>
    </style:style>
    <style:style style:name="MT3" style:family="text">
      <style:text-properties fo:language="en" fo:country="US" style:font-name-asian="Times New Roman1" style:language-asian="ru" style:country-asian="RU" style:font-name-complex="Times New Roman1" style:font-size-complex="14pt"/>
    </style:style>
    <style:style style:name="MT4" style:family="text">
      <style:text-properties style:font-name-asian="Times New Roman1" style:font-name-complex="Times New Roman1" style:font-size-complex="10pt"/>
    </style:style>
    <style:style style:name="MT5" style:family="text">
      <style:text-properties style:text-underline-style="solid" style:text-underline-width="auto" style:text-underline-color="font-color" style:font-name-asian="Times New Roman1" style:language-asian="ru" style:country-asian="RU" style:font-name-complex="Times New Roman1" style:font-size-complex="10pt"/>
    </style:style>
    <style:style style:name="MT6" style:family="text">
      <style:text-properties style:text-underline-style="solid" style:text-underline-width="auto" style:text-underline-color="font-color" style:font-name-asian="Times New Roman1" style:language-asian="ru" style:country-asian="RU" style:font-name-complex="Times New Roman1" style:font-size-complex="14pt"/>
    </style:style>
    <style:style style:name="MT7" style:family="text">
      <style:text-properties fo:language="en" fo:country="US" officeooo:rsid="000baf8a" style:font-name-asian="Times New Roman1" style:language-asian="ru" style:country-asian="RU" style:font-name-complex="Times New Roman1" style:font-size-complex="14pt"/>
    </style:style>
    <style:style style:name="MT8" style:family="text">
      <style:text-properties style:font-name-asian="Times New Roman1" style:font-name-complex="Times New Roman1" style:font-size-complex="14pt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  <text:p text:style-name="Footer"/>
      </style:footer>
      <style:footer-first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E"/>
          <table:table-row table:style-name="Таблица1.1">
            <table:table-cell table:style-name="Таблица1.A1" office:value-type="string">
              <text:p text:style-name="MP2" loext:marker-style-name="MT1"><text:span text:style-name="MT2">Руководитель</text:span><text:span text:style-name="MT3"> </text:span></text:p>
            </table:table-cell>
            <table:table-cell table:style-name="Таблица1.A1" office:value-type="string">
              <text:p text:style-name="MP3" loext:marker-style-name="MT4"/>
            </table:table-cell>
            <table:table-cell table:style-name="Таблица1.A1" office:value-type="string">
              <text:p text:style-name="MP4" loext:marker-style-name="MT1"/>
            </table:table-cell>
            <table:table-cell table:style-name="Таблица1.A1" office:value-type="string">
              <text:p text:style-name="MP5" loext:marker-style-name="MT5"><text:span text:style-name="MT6">_________</text:span><text:span text:style-name="MT5"/></text:p>
            </table:table-cell>
            <table:table-cell table:style-name="Таблица1.A1" office:value-type="string">
              <text:p text:style-name="MP5" loext:marker-style-name="MT1"><text:span text:style-name="MT2">И. Р. Нигматуллин</text:span><text:span text:style-name="MT1"/></text:p>
            </table:table-cell>
          </table:table-row>
          <table:table-row table:style-name="Таблица1.1">
            <table:table-cell table:style-name="Таблица1.A1" office:value-type="string">
              <text:p text:style-name="MP6" loext:marker-style-name="MT2"/>
            </table:table-cell>
            <table:table-cell table:style-name="Таблица1.A1" office:value-type="string">
              <text:p text:style-name="MP4" loext:marker-style-name="MT1"/>
            </table:table-cell>
            <table:table-cell table:style-name="Таблица1.A1" office:value-type="string">
              <text:p text:style-name="MP4" loext:marker-style-name="MT1"/>
            </table:table-cell>
            <table:table-cell table:style-name="Таблица1.A1" office:value-type="string">
              <text:p text:style-name="MP6" loext:marker-style-name="MT2"/>
            </table:table-cell>
            <table:table-cell table:style-name="Таблица1.A1" office:value-type="string">
              <text:p text:style-name="MP7" loext:marker-style-name="MT6"/>
            </table:table-cell>
          </table:table-row>
          <table:table-row table:style-name="Таблица1.3">
            <table:table-cell table:style-name="Таблица1.A1" office:value-type="string">
              <text:p text:style-name="MP8" loext:marker-style-name="MT1"><text:span text:style-name="MT2">Студент</text:span><text:span text:style-name="MT1"/></text:p>
            </table:table-cell>
            <table:table-cell table:style-name="Таблица1.A1" office:value-type="string">
              <text:p text:style-name="MP9" loext:marker-style-name="MT1"><text:span text:style-name="MT2">ГФ2</text:span><text:span text:style-name="MT7">5</text:span><text:span text:style-name="MT2">-</text:span><text:span text:style-name="MT3">0</text:span><text:span text:style-name="MT7">1</text:span><text:span text:style-name="MT3">Б</text:span></text:p>
            </table:table-cell>
            <table:table-cell table:style-name="Таблица1.A1" office:value-type="string">
              <text:p text:style-name="MP5" loext:marker-style-name="MT1"><text:span text:style-name="MT1"/></text:p>
            </table:table-cell>
            <table:table-cell table:style-name="Таблица1.A1" office:value-type="string">
              <text:p text:style-name="MP5" loext:marker-style-name="MT5"><text:span text:style-name="MT6">_________ </text:span><text:span text:style-name="MT5"/></text:p>
            </table:table-cell>
            <table:table-cell table:style-name="Таблица1.A1" office:value-type="string">
              <text:p text:style-name="MP10" loext:marker-style-name="MT1"><text:span text:style-name="MT2">М.Э.Ровшанович</text:span></text:p>
            </table:table-cell>
          </table:table-row>
          <table:table-row table:style-name="Таблица1.4">
            <table:table-cell table:style-name="Таблица1.A1" office:value-type="string">
              <text:p text:style-name="MP11" loext:marker-style-name="MT1"/>
            </table:table-cell>
            <table:table-cell table:style-name="Таблица1.A1" office:value-type="string">
              <text:p text:style-name="MP12" loext:marker-style-name="MT1"/>
            </table:table-cell>
            <table:table-cell table:style-name="Таблица1.A1" office:value-type="string">
              <text:p text:style-name="MP4" loext:marker-style-name="MT1"/>
            </table:table-cell>
            <table:table-cell table:style-name="Таблица1.A1" office:value-type="string">
              <text:p text:style-name="MP6" loext:marker-style-name="MT2"/>
            </table:table-cell>
            <table:table-cell table:style-name="Таблица1.A1" office:value-type="string">
              <text:p text:style-name="MP7" loext:marker-style-name="MT6"/>
            </table:table-cell>
          </table:table-row>
        </table:table>
        <text:p text:style-name="MP13" loext:marker-style-name="MT8"/>
        <text:p text:style-name="MP13" loext:marker-style-name="MT8"/>
        <text:p text:style-name="MP14" loext:marker-style-name="MT8"><text:span text:style-name="MT8">Красноярск 2026</text:span><text:span text:style-name="MT8"/></text:p>
      </style:footer-first>
    </style:master-page>
    <style:master-page style:name="Converted1" style:page-layout-name="Mpm1" draw:style-name="Mdp1">
      <style:footer>
        <text:p text:style-name="MP1"><text:page-number text:select-page="current">5</text:page-number></text:p>
      </style:footer>
    </style:master-page>
    <style:master-page style:name="Converted2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Алекс</meta:initial-creator>
    <meta:editing-cycles>16</meta:editing-cycles>
    <meta:print-date>2026-05-20T17:56:00</meta:print-date>
    <meta:creation-date>2026-05-20T17:54:00</meta:creation-date>
    <dc:date>2026-06-27T18:55:28.945962600</dc:date>
    <meta:editing-duration>PT6H24M34S</meta:editing-duration>
    <meta:generator>LibreOffice/26.2.0.3$Windows_X86_64 LibreOffice_project/620$Build-3</meta:generator>
    <meta:document-statistic meta:table-count="1" meta:image-count="0" meta:object-count="0" meta:page-count="12" meta:paragraph-count="89" meta:word-count="1632" meta:character-count="14106" meta:non-whitespace-character-count="12565"/>
    <meta:user-defined meta:name="AppVersion">16.0000</meta:user-defined>
    <meta:user-defined meta:name="Company">diakov.net</meta:user-defined>
    <meta:template xlink:type="simple" xlink:actuate="onRequest" xlink:title="Normal.dotm" xlink:href=""/>
  </office:meta>
</office:document-meta>
</file>